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graphic" style:name="a446" style:parent-style-name="Graphics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graphic" style:name="a448" style:parent-style-name="Graphics">
      <style:graphic-properties draw:fill="none" draw:stroke="non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non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ajd-tytułowy" presentation:presentation-page-layout-name="Master1-PPL1" draw:id="Slide-256">
        <draw:frame draw:id="id63" presentation:style-name="a389" draw:name="Tytuł 1" svg:x="1.66667in" svg:y="1.22743in" svg:width="10in" svg:height="2.61111in" presentation:class="title" presentation:placeholder="false">
          <draw:text-box>
            <text:p text:style-name="a388" text:class-names="" text:cond-style-name=""><text:span text:style-name="a381" text:class-names="">Impact of positron range on image reconstruction in<text:s text:c="1"/></text:span><text:span text:style-name="a382" text:class-names="">18</text:span><text:span text:style-name="a383" text:class-names="">F and<text:s text:c="1"/></text:span><text:span text:style-name="a384" text:class-names="">44</text:span><text:span text:style-name="a385" text:class-names="">Sc PET imaging</text:span><text:span text:style-name="a386" text:class-names=""><text:s text:c="1"/></text:span><text:span text:style-name="a387" text:class-names=""/></text:p>
          </draw:text-box>
          <svg:title/>
          <svg:desc/>
        </draw:frame>
        <draw:frame draw:id="id64" presentation:style-name="a392" draw:name="Podtytuł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90" text:class-names="">Anna Giebułtowska</text:span></text:p>
          </draw:text-box>
          <svg:title/>
          <svg:desc/>
        </draw:frame>
      </draw:page>
      <draw:page draw:name="Slide2" draw:style-name="a393" draw:master-page-name="Master1-Layout1-title-Slajd-tytułowy" presentation:presentation-page-layout-name="Master1-PPL1" draw:id="Slide-257">
        <draw:frame draw:id="id65" presentation:style-name="a397" draw:name="Tytuł 1" svg:x="-3.41936in" svg:y="0.61547in" svg:width="8.77419in" svg:height="0.48343in" presentation:class="title" presentation:placeholder="false">
          <draw:text-box>
            <text:p text:style-name="a396" text:class-names="" text:cond-style-name=""><text:span text:style-name="a394" text:class-names="">Agenda</text:span><text:span text:style-name="a395" text:class-names=""/></text:p>
          </draw:text-box>
          <svg:title/>
          <svg:desc/>
        </draw:frame>
        <draw:frame draw:id="id66" presentation:style-name="a420" draw:name="Podtytuł 2" svg:x="3.50384in" svg:y="1.0989in" svg:width="10in" svg:height="1.81076in" presentation:class="subtitle" presentation:placeholder="false">
          <draw:text-box>
            <text:list text:style-name="a401">
              <text:list-item>
                <text:p text:style-name="a400" text:class-names="" text:cond-style-name=""><text:span text:style-name="a398" text:class-names="">Motivation</text:span><text:span text:style-name="a399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2" text:class-names="">Current</text:span><text:span text:style-name="a403" text:class-names=""><text:s text:c="1"/></text:span><text:span text:style-name="a404" text:class-names="">stage</text:span><text:span text:style-name="a405" text:class-names=""><text:s text:c="1"/>of<text:s text:c="1"/></text:span><text:span text:style-name="a406" text:class-names="">work</text:span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Summary</text:span><text:span text:style-name="a411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4" text:class-names="">Future</text:span><text:span text:style-name="a415" text:class-names=""><text:s text:c="1"/></text:span><text:span text:style-name="a416" text:class-names="">reaserch</text:span><text:span text:style-name="a417" text:class-names=""/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Tytuł-i-zawartość" presentation:presentation-page-layout-name="Master1-PPL2" draw:id="Slide-258">
        <draw:frame draw:id="id67" presentation:style-name="a425" draw:name="Tytuł 1" svg:x="0in" svg:y="0.01996in" svg:width="2.31989in" svg:height="1.44965in" presentation:class="title" presentation:placeholder="false">
          <draw:text-box>
            <text:p text:style-name="a424" text:class-names="" text:cond-style-name=""><text:span text:style-name="a422" text:class-names="">Motivation</text:span><text:span text:style-name="a423" text:class-names=""/></text:p>
          </draw:text-box>
          <svg:title/>
          <svg:desc/>
        </draw:frame>
        <draw:frame draw:id="id68" presentation:style-name="a426" draw:name="Symbol zastępczy zawartości 4" svg:x="3.95868in" svg:y="0.89202in" svg:width="4.80939in" svg:height="5.264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427" draw:name="Obraz 6" svg:x="8.93907in" svg:y="0.01996in" svg:width="4.10036in" svg:height="6.1422in" style:rel-width="scale" style:rel-height="scale">
          <draw:image xlink:href="media/image2.png" xlink:type="simple" xlink:show="embed" xlink:actuate="onLoad"/>
          <svg:title/>
          <svg:desc/>
        </draw:frame>
        <draw:g draw:name="Grupa 12" draw:id="id70">
          <svg:title/>
          <svg:desc/>
          <draw:frame draw:id="id78" draw:style-name="a447" draw:name="Pismo odręczne 7" svg:x="9.23501in" svg:y="0.0859in" svg:width="0.32677in" svg:height="0.34016in" style:rel-width="scale" style:rel-height="scale">
            <draw:image xlink:href="media/image3.png" xlink:type="simple" xlink:show="embed" xlink:actuate="onLoad"/>
            <svg:title/>
            <svg:desc/>
          </draw:frame>
          <draw:frame draw:id="id79" draw:style-name="a448" draw:name="Pismo odręczne 8" svg:x="9.33305in" svg:y="0.21386in" svg:width="0.34291in" svg:height="0.09803in" style:rel-width="scale" style:rel-height="scale">
            <draw:image xlink:href="media/image4.png" xlink:type="simple" xlink:show="embed" xlink:actuate="onLoad"/>
            <svg:title/>
            <svg:desc/>
          </draw:frame>
        </draw:g>
        <draw:g draw:name="Grupa 11" draw:id="id71">
          <svg:title/>
          <svg:desc/>
          <draw:frame draw:id="id76" draw:style-name="a445" draw:name="Pismo odręczne 9" svg:x="11.49407in" svg:y="0.18236in" svg:width="0.27126in" svg:height="0.34646in" style:rel-width="scale" style:rel-height="scale">
            <draw:image xlink:href="media/image5.png" xlink:type="simple" xlink:show="embed" xlink:actuate="onLoad"/>
            <svg:title/>
            <svg:desc/>
          </draw:frame>
          <draw:frame draw:id="id77" draw:style-name="a446" draw:name="Pismo odręczne 10" svg:x="11.83659in" svg:y="0.35401in" svg:width="0.50827in" svg:height="0.18583in" style:rel-width="scale" style:rel-height="scale">
            <draw:image xlink:href="media/image6.png" xlink:type="simple" xlink:show="embed" xlink:actuate="onLoad"/>
            <svg:title/>
            <svg:desc/>
          </draw:frame>
        </draw:g>
        <draw:frame draw:id="id72" draw:style-name="a428" draw:name="Obraz 14" svg:x="0.08518in" svg:y="0.96751in" svg:width="3.95868in" svg:height="5.71716in" style:rel-width="scale" style:rel-height="scale">
          <draw:image xlink:href="media/image7.png" xlink:type="simple" xlink:show="embed" xlink:actuate="onLoad"/>
          <svg:title/>
          <svg:desc/>
        </draw:frame>
        <draw:frame draw:id="id73" draw:style-name="a433" draw:transform="translate(-1.58065in -0.31555in) rotate(-3.14159) translate(1.78495in 6.91981in)" draw:name="pole tekstowe 16" svg:width="3.16129in" svg:height="0.6311in">
          <draw:text-box>
            <text:p text:style-name="a432" text:class-names="" text:cond-style-name=""><text:span text:style-name="a429" text:class-names="">Carter:<text:s text:c="1"/></text:span><text:span text:style-name="a430" text:class-names="">https</text:span><text:span text:style-name="a431" text:class-names="">://pmc.ncbi.nlm.nih.gov/articles/PMC6805144/#TFN1</text:span></text:p>
          </draw:text-box>
          <svg:title/>
          <svg:desc/>
        </draw:frame>
        <draw:frame draw:id="id74" draw:style-name="a438" draw:name="pole tekstowe 18" svg:x="4.63125in" svg:y="6.41935in" svg:width="3.11828in" svg:height="0.65635in">
          <draw:text-box>
            <text:p text:style-name="a437" text:class-names="" text:cond-style-name=""><text:span text:style-name="a434" text:class-names="">Champion:<text:s text:c="1"/></text:span><text:span text:style-name="a435" text:class-names="">https</text:span><text:span text:style-name="a436" text:class-names="">://iopscience.iop.org/article/10.1088/0031-9155/52/22/004/pdf</text:span></text:p>
          </draw:text-box>
          <svg:title/>
          <svg:desc/>
        </draw:frame>
        <draw:frame draw:id="id75" draw:style-name="a444" draw:name="pole tekstowe 20" svg:x="9.74271in" svg:y="6.41935in" svg:width="2.60215in" svg:height="0.6311in">
          <draw:text-box>
            <text:p text:style-name="a443" text:class-names="" text:cond-style-name=""><text:span text:style-name="a439" text:class-names="">Partige</text:span><text:span text:style-name="a440" text:class-names="">:<text:s text:c="1"/></text:span><text:span text:style-name="a441" text:class-names="">https</text:span><text:span text:style-name="a442" text:class-names="">://www.sciencedirect.com/science/article/pii/S0168900206016640</text:span></text:p>
          </draw:text-box>
          <svg:title/>
          <svg:desc/>
        </draw:frame>
      </draw:page>
      <draw:page draw:name="Slide6" draw:style-name="a449" draw:master-page-name="Master1-Layout2-obj-Tytuł-i-zawartość" presentation:presentation-page-layout-name="Master1-PPL2" draw:id="Slide-261">
        <draw:frame draw:id="id80" presentation:style-name="a453" draw:name="Tytuł 1" svg:x="0in" svg:y="0in" svg:width="2.96774in" svg:height="1.44965in" presentation:class="title" presentation:placeholder="false">
          <draw:text-box>
            <text:p text:style-name="a452" text:class-names="" text:cond-style-name=""><text:span text:style-name="a450" text:class-names="">Coś w środku</text:span><text:span text:style-name="a451" text:class-names=""/></text:p>
          </draw:text-box>
          <svg:title/>
          <svg:desc/>
        </draw:frame>
        <draw:frame draw:id="id81" presentation:style-name="a454" draw:name="Symbol zastępczy zawartości 4" svg:x="4.30645in" svg:y="0.72483in" svg:width="5.94624in" svg:height="3.1501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82" draw:style-name="a458" draw:name="pole tekstowe 5" svg:x="11.65131in" svg:y="6.86867in" svg:width="2.21978in" svg:height="0.40391in">
          <draw:text-box>
            <text:p text:style-name="a457" text:class-names="" text:cond-style-name=""><text:span text:style-name="a455" text:class-names="">JPET Raport</text:span><text:span text:style-name="a456" text:class-names=""/></text:p>
          </draw:text-box>
          <svg:title/>
          <svg:desc/>
        </draw:frame>
        <draw:frame draw:id="id83" draw:style-name="a459" draw:name="Obraz 7" svg:x="4.30645in" svg:y="3.875in" svg:width="5.94624in" svg:height="3.1799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" draw:style-name="a460" draw:master-page-name="Master1-Layout2-obj-Tytuł-i-zawartość" presentation:presentation-page-layout-name="Master1-PPL2" draw:id="Slide-262">
        <draw:frame draw:id="id84" presentation:style-name="a464" draw:name="Tytuł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Wykres zanikanie aktywności Sc i F w czasie</text:span><text:span text:style-name="a462" text:class-names=""/></text:p>
          </draw:text-box>
          <svg:title/>
          <svg:desc/>
        </draw:frame>
        <draw:frame draw:id="id85" presentation:style-name="a465" draw:name="Symbol zastępczy zawartości 4" svg:x="3.09557in" svg:y="1.75269in" svg:width="7.64001in" svg:height="5.34801in" style:rel-width="scale" style:rel-height="scale" presentation:class="graphic" presentation:placeholder="false">
          <draw:image xlink:href="media/image10.png" xlink:type="simple" xlink:show="embed" xlink:actuate="onLoad"/>
          <svg:title/>
          <svg:desc>Obraz zawierający tekst, linia, Wykres, diagram

Zawartość wygenerowana przez AI może być niepoprawna.</svg:desc>
        </draw:frame>
      </draw:page>
      <draw:page draw:name="Slide8" draw:style-name="a466" draw:master-page-name="Master1-Layout2-obj-Tytuł-i-zawartość" presentation:presentation-page-layout-name="Master1-PPL2" draw:id="Slide-263">
        <draw:frame draw:id="id86" presentation:style-name="a470" draw:name="Tytuł 1" svg:x="0in" svg:y="0.23233in" svg:width="2.68817in" svg:height="0.89102in" presentation:class="title" presentation:placeholder="false">
          <draw:text-box>
            <text:p text:style-name="a469" text:class-names="" text:cond-style-name=""><text:span text:style-name="a467" text:class-names="">Energy spectrum</text:span><text:span text:style-name="a468" text:class-names=""/></text:p>
          </draw:text-box>
          <svg:title/>
          <svg:desc/>
        </draw:frame>
        <draw:frame draw:id="id87" presentation:style-name="a471" draw:name="Symbol zastępczy zawartości 12" svg:x="3.28187in" svg:y="0.7543in" svg:width="8.54621in" svg:height="5.12773in" style:rel-width="scale" style:rel-height="scale" presentation:class="graphic" presentation:placeholder="false">
          <draw:image xlink:href="media/image11.png" xlink:type="simple" xlink:show="embed" xlink:actuate="onLoad"/>
          <svg:title/>
          <svg:desc>Obraz zawierający linia, Wykres, diagram, tekst

Zawartość wygenerowana przez AI może być niepoprawna.</svg:desc>
        </draw:frame>
        <draw:frame draw:id="id88" draw:style-name="a472" draw:name="Obraz 14" svg:x="5.07011in" svg:y="5.9914in" svg:width="4.96973in" svg:height="0.45837in" style:rel-width="scale" style:rel-height="scale">
          <draw:image xlink:href="media/image12.png" xlink:type="simple" xlink:show="embed" xlink:actuate="onLoad"/>
          <svg:title/>
          <svg:desc/>
        </draw:frame>
        <draw:frame draw:id="id89" draw:style-name="a473" draw:name="Obraz 16" svg:x="5.95432in" svg:y="6.55914in" svg:width="3.20132in" svg:height="0.65699in" style:rel-width="scale" style:rel-height="scale">
          <draw:image xlink:href="media/image13.png" xlink:type="simple" xlink:show="embed" xlink:actuate="onLoad"/>
          <svg:title/>
          <svg:desc/>
        </draw:frame>
        <draw:frame draw:id="id90" draw:style-name="a476" draw:name="pole tekstowe 18" svg:x="9.52688in" svg:y="6.96369in" svg:width="3.92473in" svg:height="0.50488in">
          <draw:text-box>
            <text:p text:style-name="a475" text:class-names="" text:cond-style-name=""><text:span text:style-name="a474" text:class-names="">Levin CS, Hoffman EJ. Calculation of positron range and its effect on PET resolution. Phys Med Biol.</text:span></text:p>
          </draw:text-box>
          <svg:title/>
          <svg:desc/>
        </draw:frame>
      </draw:page>
      <draw:page draw:name="Slide9" draw:style-name="a477" draw:master-page-name="Master1-Layout2-obj-Tytuł-i-zawartość" presentation:presentation-page-layout-name="Master1-PPL2" draw:id="Slide-264">
        <draw:frame draw:id="id91" presentation:style-name="a481" draw:name="Tytuł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Wykres/tabela z zasięgów obliczonych vs literaturowe vs energia</text:span><text:span text:style-name="a479" text:class-names=""/></text:p>
          </draw:text-box>
          <svg:title/>
          <svg:desc/>
        </draw:frame>
        <draw:frame draw:id="id92" presentation:style-name="a482" draw:name="Symbol zastępczy zawartości 4" svg:x="0.11116in" svg:y="2in" svg:width="5.53696in" svg:height="4.03478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93" draw:style-name="a483" draw:name="Obraz 6" svg:x="5.84955in" svg:y="1.88825in" svg:width="6.67464in" svg:height="2.55592in" style:rel-width="scale" style:rel-height="scale">
          <draw:image xlink:href="media/image15.png" xlink:type="simple" xlink:show="embed" xlink:actuate="onLoad"/>
          <svg:title/>
          <svg:desc/>
        </draw:frame>
        <draw:frame draw:id="id94" draw:style-name="a484" draw:name="Obraz 8" svg:x="5.75872in" svg:y="4.44417in" svg:width="6.52557in" svg:height="2.91692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4" draw:style-name="a485" draw:master-page-name="Master1-Layout2-obj-Tytuł-i-zawartość" presentation:presentation-page-layout-name="Master1-PPL2" draw:id="Slide-259">
        <draw:frame draw:id="id95" presentation:style-name="a489" draw:name="Tytuł 1" svg:x="0.91667in" svg:y="0.39931in" svg:width="11.5in" svg:height="1.44965in" presentation:class="title" presentation:placeholder="false">
          <draw:text-box>
            <text:p text:style-name="a488" text:class-names="" text:cond-style-name=""><text:span text:style-name="a486" text:class-names="">Summary</text:span><text:span text:style-name="a487" text:class-names=""/></text:p>
          </draw:text-box>
          <svg:title/>
          <svg:desc/>
        </draw:frame>
        <draw:frame draw:id="id96" presentation:style-name="a490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491" draw:master-page-name="Master1-Layout2-obj-Tytuł-i-zawartość" presentation:presentation-page-layout-name="Master1-PPL2" draw:id="Slide-265">
        <draw:frame draw:id="id97" presentation:style-name="a497" draw:name="Tytuł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2" text:class-names="">Future</text:span><text:span text:style-name="a493" text:class-names=""><text:s text:c="1"/></text:span><text:span text:style-name="a494" text:class-names="">reaserch</text:span><text:span text:style-name="a495" text:class-names=""/></text:p>
          </draw:text-box>
          <svg:title/>
          <svg:desc/>
        </draw:frame>
        <draw:frame draw:id="id98" presentation:style-name="a498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99" draw:master-page-name="Master1-Layout2-obj-Tytuł-i-zawartość" presentation:presentation-page-layout-name="Master1-PPL2" draw:id="Slide-260">
        <draw:frame draw:id="id99" presentation:style-name="a509" draw:name="Tytuł 1" svg:x="0.91667in" svg:y="3.02517in" svg:width="11.5in" svg:height="1.44965in" presentation:class="title" presentation:placeholder="false">
          <draw:text-box>
            <text:p text:style-name="a508" text:class-names="" text:cond-style-name=""><text:span text:style-name="a500" text:class-names="">Thank</text:span><text:span text:style-name="a501" text:class-names=""><text:s text:c="1"/></text:span><text:span text:style-name="a502" text:class-names="">You</text:span><text:span text:style-name="a503" text:class-names=""><text:s text:c="1"/>for<text:s text:c="1"/></text:span><text:span text:style-name="a504" text:class-names="">Your</text:span><text:span text:style-name="a505" text:class-names=""><text:s text:c="1"/></text:span><text:span text:style-name="a506" text:class-names="">attention</text:span><text:span text:style-name="a5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4" draw:name="Symbol zastępczy tytuł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1" presentation:style-name="a21" draw:name="Symbol zastępczy tekst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ymbol zastępczy daty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ymbol zastępczy stop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ymbol zastępczy numeru slajd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ajd-tytułowy" style:page-layout-name="pageLayout1" draw:style-name="a34">
      <draw:frame draw:id="id5" presentation:style-name="a38" draw:name="Tytuł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ij, aby edytować styl</text:span><text:span text:style-name="a36" text:class-names=""/></text:p>
        </draw:text-box>
        <svg:title/>
        <svg:desc/>
      </draw:frame>
      <draw:frame draw:id="id6" presentation:style-name="a42" draw:name="Podtytuł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ij, aby edytować styl wzorca podtytułu</text:span><text:span text:style-name="a40" text:class-names=""/></text:p>
        </draw:text-box>
        <svg:title/>
        <svg:desc/>
      </draw:frame>
      <draw:frame draw:id="id7" presentation:style-name="a47" draw:name="Symbol zastępczy daty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ymbol zastępczy stop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ymbol zastępczy numeru slajd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ytuł-i-zawartość" style:page-layout-name="pageLayout1" draw:style-name="a55">
      <draw:frame draw:id="id10" presentation:style-name="a59" draw:name="Tytuł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ij, aby edytować styl</text:span><text:span text:style-name="a57" text:class-names=""/></text:p>
        </draw:text-box>
        <svg:title/>
        <svg:desc/>
      </draw:frame>
      <draw:frame draw:id="id11" presentation:style-name="a76" draw:name="Symbol zastępczy zawartośc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j, aby edytować style wzorca teks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i poziom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ąty pozio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ymbol zastępczy daty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ymbol zastępczy stop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ymbol zastępczy numeru slajd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Nagłówek-sekcji" style:page-layout-name="pageLayout1" draw:style-name="a89">
      <draw:frame draw:id="id15" presentation:style-name="a93" draw:name="Tytuł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ij, aby edytować styl</text:span><text:span text:style-name="a91" text:class-names=""/></text:p>
        </draw:text-box>
        <svg:title/>
        <svg:desc/>
      </draw:frame>
      <draw:frame draw:id="id16" presentation:style-name="a97" draw:name="Symbol zastępczy tekst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102" draw:name="Symbol zastępczy daty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ymbol zastępczy stop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ymbol zastępczy numeru slajd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10">
      <draw:frame draw:id="id20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ij, aby edytować styl</text:span><text:span text:style-name="a112" text:class-names=""/></text:p>
        </draw:text-box>
        <svg:title/>
        <svg:desc/>
      </draw:frame>
      <draw:frame draw:id="id21" presentation:style-name="a131" draw:name="Symbol zastępczy zawartośc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ąty pozio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ymbol zastępczy zawartośc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j, aby edytować style wzorca teks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i poziom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ąty pozio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ymbol zastępczy daty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ymbol zastępczy stop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ymbol zastępczy numeru slajd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ównanie" style:page-layout-name="pageLayout1" draw:style-name="a161">
      <draw:frame draw:id="id26" presentation:style-name="a165" draw:name="Tytuł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ij, aby edytować styl</text:span><text:span text:style-name="a163" text:class-names=""/></text:p>
        </draw:text-box>
        <svg:title/>
        <svg:desc/>
      </draw:frame>
      <draw:frame draw:id="id27" presentation:style-name="a169" draw:name="Symbol zastępczy tekst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86" draw:name="Symbol zastępczy zawartośc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j, aby edytować style wzorca teks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i poziom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ąty pozio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ymbol zastępczy tekst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207" draw:name="Symbol zastępczy zawartośc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e wzorca teks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i poziom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ąty pozio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ymbol zastępczy daty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ymbol zastępczy stop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ymbol zastępczy numeru slajd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ylko-tytuł" style:page-layout-name="pageLayout1" draw:style-name="a220">
      <draw:frame draw:id="id34" presentation:style-name="a224" draw:name="Tytuł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ij, aby edytować styl</text:span><text:span text:style-name="a222" text:class-names=""/></text:p>
        </draw:text-box>
        <svg:title/>
        <svg:desc/>
      </draw:frame>
      <draw:frame draw:id="id35" presentation:style-name="a229" draw:name="Symbol zastępczy daty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ymbol zastępczy stop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ymbol zastępczy numeru slajd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usty" style:page-layout-name="pageLayout1" draw:style-name="a237">
      <draw:frame draw:id="id38" presentation:style-name="a242" draw:name="Symbol zastępczy daty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ymbol zastępczy stop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ymbol zastępczy numeru slajd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50">
      <draw:frame draw:id="id41" presentation:style-name="a254" draw:name="Tytuł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ij, aby edytować styl</text:span><text:span text:style-name="a252" text:class-names=""/></text:p>
        </draw:text-box>
        <svg:title/>
        <svg:desc/>
      </draw:frame>
      <draw:frame draw:id="id42" presentation:style-name="a271" draw:name="Symbol zastępczy zawartośc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j, aby edytować style wzorca teks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i poziom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ąty pozio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ymbol zastępczy tekst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80" draw:name="Symbol zastępczy daty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ymbol zastępczy stop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ymbol zastępczy numeru slajd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az-z-podpisem" style:page-layout-name="pageLayout1" draw:style-name="a288">
      <draw:frame draw:id="id47" presentation:style-name="a292" draw:name="Tytuł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ij, aby edytować styl</text:span><text:span text:style-name="a290" text:class-names=""/></text:p>
        </draw:text-box>
        <svg:title/>
        <svg:desc/>
      </draw:frame>
      <draw:frame draw:id="id48" presentation:style-name="a295" draw:name="Symbol zastępczy obraz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ymbol zastępczy tekst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304" draw:name="Symbol zastępczy daty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ymbol zastępczy stop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ymbol zastępczy numeru slajd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312">
      <draw:frame draw:id="id53" presentation:style-name="a316" draw:name="Tytuł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ij, aby edytować styl</text:span><text:span text:style-name="a314" text:class-names=""/></text:p>
        </draw:text-box>
        <svg:title/>
        <svg:desc/>
      </draw:frame>
      <draw:frame draw:id="id54" presentation:style-name="a333" draw:name="Symbol zastępczy tytułu pionowego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j, aby edytować style wzorca teks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i poziom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ąty pozio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ymbol zastępczy numeru slajd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46">
      <draw:frame draw:id="id58" presentation:style-name="a350" draw:name="Tytuł pionowy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ij, aby edytować styl</text:span><text:span text:style-name="a348" text:class-names=""/></text:p>
        </draw:text-box>
        <svg:title/>
        <svg:desc/>
      </draw:frame>
      <draw:frame draw:id="id59" presentation:style-name="a367" draw:name="Symbol zastępczy tytułu pionowego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j, aby edytować style wzorca teks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i poziom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ąty pozio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ymbol zastępczy daty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ymbol zastępczy stop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ymbol zastępczy numeru slajd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na Giebułtowska</meta:initial-creator>
    <dc:creator>Anna Giebułtowska</dc:creator>
    <meta:creation-date>2026-01-10T15:44:46Z</meta:creation-date>
    <dc:date>2026-01-13T12:19:06Z</dc:date>
    <meta:editing-cycles>7</meta:editing-cycles>
    <meta:editing-duration>PT246860S</meta:editing-duration>
    <meta:document-statistic meta:paragraph-count="20" meta:word-count="132"/>
  </office:meta>
</office:document-meta>
</file>